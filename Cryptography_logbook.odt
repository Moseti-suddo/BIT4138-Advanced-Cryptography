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9000003D2E736C683.png" manifest:media-type="image/png"/>
  <manifest:file-entry manifest:full-path="Pictures/1000000100000319000003D2BA765B82.png" manifest:media-type="image/png"/>
  <manifest:file-entry manifest:full-path="Pictures/1000000100000319000003D21DC24A58.png" manifest:media-type="image/png"/>
  <manifest:file-entry manifest:full-path="Pictures/1000000100000319000003D23554D9BC.png" manifest:media-type="image/png"/>
  <manifest:file-entry manifest:full-path="Pictures/1000000100000319000003C18765CF4B.png" manifest:media-type="image/png"/>
  <manifest:file-entry manifest:full-path="Pictures/1000000100000319000003D24C5CF09E.png" manifest:media-type="image/png"/>
  <manifest:file-entry manifest:full-path="Pictures/1000000100000291000003677B319AA6.png" manifest:media-type="image/png"/>
  <manifest:file-entry manifest:full-path="Pictures/1000000100000319000003D2587FCFF5.png" manifest:media-type="image/png"/>
  <manifest:file-entry manifest:full-path="Pictures/100000010000028B00000102E125B7F3.png" manifest:media-type="image/png"/>
  <manifest:file-entry manifest:full-path="Pictures/10000001000002D7000002934D731273.png" manifest:media-type="image/png"/>
  <manifest:file-entry manifest:full-path="Pictures/100000010000028F0000020890919E5E.png" manifest:media-type="image/png"/>
  <manifest:file-entry manifest:full-path="Pictures/1000000100000319000003D273A72E46.png" manifest:media-type="image/png"/>
  <manifest:file-entry manifest:full-path="Pictures/10000001000002C6000001CB14F2EE03.png" manifest:media-type="image/png"/>
  <manifest:file-entry manifest:full-path="Pictures/10000001000002BE000002AE3D62EC2C.png" manifest:media-type="image/png"/>
  <manifest:file-entry manifest:full-path="Pictures/100000010000033A000003B533038C50.png" manifest:media-type="image/png"/>
  <manifest:file-entry manifest:full-path="Pictures/1000000100000319000003D20D8D4AF8.png" manifest:media-type="image/png"/>
  <manifest:file-entry manifest:full-path="Pictures/100000010000033A0000030D80DB1F89.png" manifest:media-type="image/png"/>
  <manifest:file-entry manifest:full-path="Pictures/1000000100000212000003B550D8CB21.png" manifest:media-type="image/png"/>
  <manifest:file-entry manifest:full-path="Pictures/1000000100000319000003D2D9E6DF40.png" manifest:media-type="image/png"/>
  <manifest:file-entry manifest:full-path="Pictures/10000001000002960000019F593A16EB.png" manifest:media-type="image/png"/>
  <manifest:file-entry manifest:full-path="Pictures/100000010000033A0000038D887240B3.png" manifest:media-type="image/png"/>
  <manifest:file-entry manifest:full-path="Pictures/10000001000002E10000030BDB740092.png" manifest:media-type="image/png"/>
  <manifest:file-entry manifest:full-path="Pictures/1000000100000319000003D261B7D866.png" manifest:media-type="image/png"/>
  <manifest:file-entry manifest:full-path="Pictures/10000001000002960000030BB4CFC011.png" manifest:media-type="image/png"/>
  <manifest:file-entry manifest:full-path="Pictures/100000010000037F0000030B8ED0273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67%"/>
    </style:style>
    <style:style style:name="P2" style:family="paragraph" style:parent-style-name="Standard">
      <style:paragraph-properties fo:margin-top="0in" fo:margin-bottom="0.0835in" style:contextual-spacing="false" fo:text-align="center" style:justify-single-word="false"/>
      <style:text-properties style:font-name="Arial" fo:font-size="18pt" fo:font-weight="bold" style:font-name-asian="Arial2" style:font-size-asian="18pt" style:font-weight-asian="bold" style:font-name-complex="Arial2" style:font-size-complex="18pt" style:font-weight-complex="bold"/>
    </style:style>
    <style:style style:name="P3" style:family="paragraph" style:parent-style-name="Standard">
      <style:paragraph-properties fo:margin-top="0.0417in" fo:margin-bottom="0.0417in" style:contextual-spacing="false" fo:text-align="center" style:justify-single-word="false"/>
      <style:text-properties style:font-name="Arial" fo:font-size="12pt" style:font-name-asian="Arial2" style:font-size-asian="12pt" style:font-name-complex="Arial2" style:font-size-complex="12pt"/>
    </style:style>
    <style:style style:name="P4"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style>
    <style:style style:name="P5" style:family="paragraph" style:parent-style-name="Standard">
      <style:paragraph-properties fo:margin-top="0in" fo:margin-bottom="0.278in" style:contextual-spacing="false"/>
      <style:text-properties fo:font-size="26pt" fo:font-weight="bold" officeooo:paragraph-rsid="001b2ee0" style:font-size-asian="26pt" style:font-weight-asian="bold" style:font-size-complex="26pt" style:font-weight-complex="bold"/>
    </style:style>
    <style:style style:name="P6" style:family="paragraph" style:parent-style-name="Standard">
      <style:paragraph-properties fo:margin-top="0in" fo:margin-bottom="0.0417in" style:contextual-spacing="false" fo:text-align="center" style:justify-single-word="false"/>
      <style:text-properties fo:color="#000000" loext:opacity="100%" style:font-name="Times New Roman" fo:font-size="24pt" fo:font-weight="bold" officeooo:rsid="0017ed39" officeooo:paragraph-rsid="001b2ee0" style:font-name-asian="Times New Roman1" style:font-size-asian="24pt" style:font-weight-asian="bold" style:font-name-complex="Times New Roman1" style:font-size-complex="24pt" style:font-weight-complex="bold"/>
    </style:style>
    <style:style style:name="P7" style:family="paragraph" style:parent-style-name="Standard">
      <style:paragraph-properties fo:margin-top="0in" fo:margin-bottom="0.0138in" style:contextual-spacing="false" fo:text-align="center" style:justify-single-word="false"/>
      <style:text-properties fo:color="#000000" loext:opacity="100%" style:font-name="Times New Roman" fo:font-size="12pt" fo:font-weight="normal" officeooo:paragraph-rsid="001b2ee0"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margin-top="0in" fo:margin-bottom="0.0138in" style:contextual-spacing="false" fo:text-align="center" style:justify-single-word="false"/>
      <style:text-properties fo:color="#000000" loext:opacity="100%" style:font-name="Times New Roman" fo:font-size="12pt" fo:font-weight="normal" officeooo:rsid="0017ed39" officeooo:paragraph-rsid="001b2ee0"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margin-top="0in" fo:margin-bottom="0.278in" style:contextual-spacing="false"/>
      <style:text-properties fo:color="#666666" loext:opacity="100%" style:font-name="Times New Roman" fo:font-size="10pt" fo:font-weight="normal" officeooo:paragraph-rsid="001b2ee0" style:font-name-asian="Times New Roman1" style:font-size-asian="10pt" style:font-weight-asian="normal" style:font-name-complex="Times New Roman1" style:font-size-complex="10pt" style:font-weight-complex="normal"/>
    </style:style>
    <style:style style:name="P10"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officeooo:paragraph-rsid="000c3692"/>
    </style:style>
    <style:style style:name="P11" style:family="paragraph" style:parent-style-name="Heading_20_1">
      <style:paragraph-properties fo:margin-top="0in" fo:margin-bottom="0.0835in" style:contextual-spacing="false" fo:break-before="page"/>
      <style:text-properties style:font-name="Arial" fo:font-size="14pt" fo:font-weight="bold" style:font-name-asian="Arial2" style:font-size-asian="14pt" style:font-weight-asian="bold" style:font-name-complex="Arial2" style:font-size-complex="14pt" style:font-weight-complex="bold"/>
    </style:style>
    <style:style style:name="P12" style:family="paragraph" style:parent-style-name="Contents_20_1">
      <style:paragraph-properties>
        <style:tab-stops>
          <style:tab-stop style:position="6.4992in" style:type="right" style:leader-style="dotted" style:leader-text="."/>
        </style:tab-stops>
      </style:paragraph-properties>
    </style:style>
    <style:style style:name="P13" style:family="paragraph" style:parent-style-name="Contents_20_2">
      <style:paragraph-properties>
        <style:tab-stops>
          <style:tab-stop style:position="6.4992in" style:type="right" style:leader-style="dotted" style:leader-text="."/>
        </style:tab-stops>
      </style:paragraph-properties>
    </style:style>
    <style:style style:name="P14" style:family="paragraph" style:parent-style-name="Heading_20_2">
      <style:paragraph-properties fo:margin-top="0.139in" fo:margin-bottom="0.0693in" style:contextual-spacing="false"/>
      <style:text-properties style:font-name="Arial" fo:font-size="12pt" fo:font-weight="bold" style:font-name-asian="Arial2" style:font-size-asian="12pt" style:font-weight-asian="bold" style:font-name-complex="Arial2" style:font-size-complex="12pt" style:font-weight-complex="bold"/>
    </style:style>
    <style:style style:name="P15" style:family="paragraph" style:parent-style-name="Standard">
      <style:paragraph-properties fo:margin-top="0.111in" fo:margin-bottom="0.0555in" style:contextual-spacing="false"/>
      <style:text-properties style:font-name="Arial" fo:font-size="11pt" fo:font-weight="bold" style:font-name-asian="Arial2" style:font-size-asian="11pt" style:font-weight-asian="bold" style:font-name-complex="Arial2" style:font-size-complex="11pt" style:font-weight-complex="bold"/>
    </style:style>
    <style:style style:name="P16" style:family="paragraph" style:parent-style-name="Standard">
      <style:paragraph-properties fo:margin-top="0in" fo:margin-bottom="0in" style:contextual-spacing="false" fo:line-height="33%"/>
      <style:text-properties style:font-name="Arial" fo:font-size="10pt" fo:font-weight="bold" style:font-name-asian="Arial2" style:font-size-asian="10pt" style:font-weight-asian="bold" style:font-name-complex="Arial2" style:font-size-complex="10pt" style:font-weight-complex="bold"/>
    </style:style>
    <style:style style:name="P17" style:family="paragraph" style:parent-style-name="Standard">
      <style:paragraph-properties fo:margin-top="0.0417in" fo:margin-bottom="0.0835in" style:contextual-spacing="false" fo:text-align="center" style:justify-single-word="false"/>
      <style:text-properties officeooo:paragraph-rsid="00113470"/>
    </style:style>
    <style:style style:name="P18" style:family="paragraph" style:parent-style-name="Standard">
      <style:paragraph-properties fo:margin-top="0.0417in" fo:margin-bottom="0.0835in" style:contextual-spacing="false" fo:text-align="center" style:justify-single-word="false"/>
      <style:text-properties style:font-name="Arial" fo:font-size="10pt" fo:font-weight="bold" officeooo:paragraph-rsid="00113470" style:font-name-asian="Arial2" style:font-size-asian="10pt" style:font-weight-asian="bold" style:font-name-complex="Arial2" style:font-size-complex="10pt" style:font-weight-complex="bold"/>
    </style:style>
    <style:style style:name="P19" style:family="paragraph" style:parent-style-name="Standard">
      <style:paragraph-properties fo:margin-top="0.0417in" fo:margin-bottom="0.0835in" style:contextual-spacing="false" fo:text-align="center" style:justify-single-word="false"/>
    </style:style>
    <style:style style:name="P20" style:family="paragraph" style:parent-style-name="Standard">
      <style:paragraph-properties fo:margin-top="0in" fo:margin-bottom="0in" style:contextual-spacing="false" fo:line-height="67%"/>
    </style:style>
    <style:style style:name="P21"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bold" officeooo:rsid="0012020e" officeooo:paragraph-rsid="0012020e" style:font-weight-asian="bold" style:font-weight-complex="bold"/>
    </style:style>
    <style:style style:name="P22"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normal" officeooo:rsid="0012020e" officeooo:paragraph-rsid="0012020e" style:font-weight-asian="normal" style:font-weight-complex="normal"/>
    </style:style>
    <style:style style:name="P23" style:family="paragraph" style:parent-style-name="Standard">
      <style:paragraph-properties fo:margin-top="0in" fo:margin-bottom="0in" style:contextual-spacing="false" fo:line-height="33%"/>
      <style:text-properties officeooo:rsid="000de185"/>
    </style:style>
    <style:style style:name="P24" style:family="paragraph" style:parent-style-name="Standard">
      <style:paragraph-properties fo:margin-top="0in" fo:margin-bottom="0in" style:contextual-spacing="false" fo:line-height="33%"/>
    </style:style>
    <style:style style:name="P25" style:family="paragraph" style:parent-style-name="Standard">
      <style:paragraph-properties fo:margin-top="0in" fo:margin-bottom="0in" style:contextual-spacing="false" fo:line-height="50%"/>
    </style:style>
    <style:style style:name="P26" style:family="paragraph" style:parent-style-name="Standard">
      <style:paragraph-properties fo:margin-top="0.0417in" fo:margin-bottom="0.0835in" style:contextual-spacing="false" fo:text-align="center" style:justify-single-word="false"/>
      <style:text-properties style:font-name="Arial" fo:font-size="10pt" fo:font-style="italic" style:font-name-asian="Arial2" style:font-size-asian="10pt" style:font-style-asian="italic" style:font-name-complex="Arial2" style:font-size-complex="10pt" style:font-style-complex="italic"/>
    </style:style>
    <style:style style:name="P27" style:family="paragraph" style:parent-style-name="Standard">
      <style:paragraph-properties fo:margin-top="0.0417in" fo:margin-bottom="0.0835in" style:contextual-spacing="false" fo:text-align="center" style:justify-single-word="false"/>
      <style:text-properties style:font-name="Arial" fo:font-size="10pt" fo:font-weight="bold" style:font-name-asian="Arial2" style:font-size-asian="10pt" style:font-weight-asian="bold" style:font-name-complex="Arial2" style:font-size-complex="10pt" style:font-weight-complex="bold"/>
    </style:style>
    <style:style style:name="P28"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bold" officeooo:rsid="0014def0" officeooo:paragraph-rsid="0014def0" style:font-weight-asian="bold" style:font-weight-complex="bold"/>
    </style:style>
    <style:style style:name="P29"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normal" officeooo:rsid="0014def0" officeooo:paragraph-rsid="0014def0" style:font-weight-asian="normal" style:font-weight-complex="normal"/>
    </style:style>
    <style:style style:name="P30"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bold" officeooo:rsid="0015a5d2" officeooo:paragraph-rsid="0015a5d2" style:font-weight-asian="bold" style:font-weight-complex="bold"/>
    </style:style>
    <style:style style:name="P31"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normal" officeooo:rsid="0015a5d2" officeooo:paragraph-rsid="0015a5d2" style:font-weight-asian="normal" style:font-weight-complex="normal"/>
    </style:style>
    <style:style style:name="P32" style:family="paragraph" style:parent-style-name="Heading_20_2">
      <style:paragraph-properties fo:margin-top="0.139in" fo:margin-bottom="0.0693in" style:contextual-spacing="false"/>
    </style:style>
    <style:style style:name="P33"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bold" officeooo:rsid="001a3862" officeooo:paragraph-rsid="001a3862" style:font-weight-asian="bold" style:font-weight-complex="bold"/>
    </style:style>
    <style:style style:name="P34"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normal" officeooo:rsid="001a3862" officeooo:paragraph-rsid="001a3862" style:font-weight-asian="normal" style:font-weight-complex="normal"/>
    </style:style>
    <style:style style:name="P35"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bold" officeooo:rsid="001a538c" officeooo:paragraph-rsid="001a538c" style:font-weight-asian="bold" style:font-weight-complex="bold"/>
    </style:style>
    <style:style style:name="P36" style:family="paragraph" style:parent-style-name="Heading_20_1">
      <style:paragraph-properties fo:margin-top="0in" fo:margin-bottom="0.0835in" style:contextual-spacing="false" fo:break-before="page"/>
    </style:style>
    <style:style style:name="T1" style:family="text">
      <style:text-properties officeooo:rsid="001b2ee0"/>
    </style:style>
    <style:style style:name="T2" style:family="text">
      <style:text-properties style:font-name="Arial" fo:font-size="10pt" fo:font-weight="bold" style:font-name-asian="Arial2" style:font-size-asian="10pt" style:font-weight-asian="bold" style:font-name-complex="Arial2" style:font-size-complex="10pt" style:font-weight-complex="bold"/>
    </style:style>
    <style:style style:name="T3" style:family="text">
      <style:text-properties style:font-name="Arial" fo:font-size="10pt" fo:font-style="italic" style:font-name-asian="Arial2" style:font-size-asian="10pt" style:font-style-asian="italic" style:font-name-complex="Arial2" style:font-size-complex="10pt"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Arial" fo:font-size="11pt" fo:font-weight="bold" style:font-name-asian="Arial2" style:font-size-asian="11pt" style:font-weight-asian="bold" style:font-name-complex="Arial2" style:font-size-complex="11pt" style:font-weight-complex="bold"/>
    </style:style>
    <style:style style:name="T6" style:family="text">
      <style:text-properties style:font-name="Arial" fo:font-size="12pt" fo:font-weight="bold" style:font-name-asian="Arial2" style:font-size-asian="12pt" style:font-weight-asian="bold" style:font-name-complex="Arial2" style:font-size-complex="12pt"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MOUNT KENYA UNIVERSITY</text:p>
      <text:p text:style-name="P3">SCHOOL OF COMPUTING AND INFORMATICS</text:p>
      <text:p text:style-name="P4"/>
      <text:p text:style-name="P4"/>
      <text:p text:style-name="P5"><text:s text:c="11"/></text:p>
      <text:p text:style-name="P6">YVONNE MOSETI</text:p>
      <text:p text:style-name="P6">BSCCS/2024/74596</text:p>
      <text:p text:style-name="P6">COMPUTER SCIENCE</text:p>
      <text:p text:style-name="P6"/>
      <text:p text:style-name="P7">BIT<text:span text:style-name="T1">4138 Advanced Cryptography</text:span></text:p>
      <text:p text:style-name="P7"/>
      <text:p text:style-name="P7"/>
      <text:p text:style-name="P7"/>
      <text:p text:style-name="P7"/>
      <text:p text:style-name="P7"/>
      <text:p text:style-name="P7"/>
      <text:p text:style-name="P8">LECTURER MICHAEL NYORO</text:p>
      <text:p text:style-name="P8">3RD YEAR SECOND SEMESTER</text:p>
      <text:p text:style-name="P9"><text:s text:c="83"/>Practical Logbook</text:p>
      <text:p text:style-name="P4"/>
      <text:p text:style-name="P4"/>
      <text:p text:style-name="P4"/>
      <text:p text:style-name="P4"/>
      <text:p text:style-name="P4"/>
      <text:p text:style-name="P4"/>
      <text:p text:style-name="P4"/>
      <text:p text:style-name="P4"/>
      <text:p text:style-name="P4"/>
      <text:p text:style-name="P4"/>
      <text:p text:style-name="P10"/>
      <text:h text:style-name="P11" text:outline-level="1"><text:bookmark-start text:name="__RefHeading___Toc2096_2251553271"/>Table of Contents<text:bookmark-end text:name="__RefHeading___Toc2096_2251553271"/></text:h>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_Toc2096_2251553271" office:name="Table of Contents" text:style-name="Index_20_Link" text:visited-style-name="Index_20_Link">Table of Contents<text:tab/>2</text:a></text:p>
          <text:p text:style-name="P12"><text:a xlink:type="simple" xlink:href="#__RefHeading___Toc2100_2251553271" office:name="Week 1: Cryptography Development Environment Setup" text:style-name="Index_20_Link" text:visited-style-name="Index_20_Link">Week 1: Cryptography Development Environment Setup<text:tab/>3</text:a></text:p>
          <text:p text:style-name="P13"><text:a xlink:type="simple" xlink:href="#__RefHeading___Toc2102_2251553271" office:name="Installation and Configuration of the Advanced Cryptography Toolchain" text:style-name="Index_20_Link" text:visited-style-name="Index_20_Link">Installation and Configuration of the Advanced Cryptography Toolchain<text:tab/>3</text:a></text:p>
          <text:p text:style-name="P12"><text:a xlink:type="simple" xlink:href="#__RefHeading___Toc2104_2251553271" office:name="Week 2: Classical Cryptography — Cipher Design and Comparison" text:style-name="Index_20_Link" text:visited-style-name="Index_20_Link">Week 2: Classical Cryptography — Cipher Design and Comparison<text:tab/>6</text:a></text:p>
          <text:p text:style-name="P13"><text:a xlink:type="simple" xlink:href="#__RefHeading___Toc2106_2251553271" office:name="Implementation of Caesar Cipher and Vigenère Cipher with Comparative Analysis" text:style-name="Index_20_Link" text:visited-style-name="Index_20_Link">Implementation of Caesar Cipher and Vigenère Cipher with Comparative Analysis<text:tab/>6</text:a></text:p>
          <text:p text:style-name="P12"><text:a xlink:type="simple" xlink:href="#__RefHeading___Toc2108_2251553271" office:name="Week 3: Stream Ciphers and Pseudorandom Sequence Analysis" text:style-name="Index_20_Link" text:visited-style-name="Index_20_Link">Week 3: Stream Ciphers and Pseudorandom Sequence Analysis<text:tab/>11</text:a></text:p>
          <text:p text:style-name="P13"><text:a xlink:type="simple" xlink:href="#__RefHeading___Toc2110_2251553271" office:name="Implementation of LFSR, RC4 Simulation, and Statistical Randomness Testing" text:style-name="Index_20_Link" text:visited-style-name="Index_20_Link">Implementation of LFSR, RC4 Simulation, and Statistical Randomness Testing<text:tab/>11</text:a></text:p>
          <text:p text:style-name="P12"><text:a xlink:type="simple" xlink:href="#__RefHeading___Toc2112_2251553271" office:name="Week 4: Stream Cipher Cryptanalysis and Berlekamp-Massey Attack" text:style-name="Index_20_Link" text:visited-style-name="Index_20_Link">Week 4: Stream Cipher Cryptanalysis and Berlekamp-Massey Attack<text:tab/>17</text:a></text:p>
          <text:p text:style-name="P13"><text:a xlink:type="simple" xlink:href="#__RefHeading___Toc2114_2251553271" office:name="Applying the Berlekamp-Massey Algorithm to Recover LFSR Structure from Output Sequences" text:style-name="Index_20_Link" text:visited-style-name="Index_20_Link">Applying the Berlekamp-Massey Algorithm to Recover LFSR Structure from Output Sequences<text:tab/>17</text:a></text:p>
          <text:p text:style-name="P12"><text:a xlink:type="simple" xlink:href="#__RefHeading___Toc2116_2251553271" office:name="Week 5: Block Ciphers and Feistel Structure Simulation" text:style-name="Index_20_Link" text:visited-style-name="Index_20_Link">Week 5: Block Ciphers and Feistel Structure Simulation<text:tab/>23</text:a></text:p>
          <text:p text:style-name="P13"><text:a xlink:type="simple" xlink:href="#__RefHeading___Toc2118_2251553271" office:name="Design and Implementation of a Feistel-Based Block Cipher with Avalanche Effect Analysis" text:style-name="Index_20_Link" text:visited-style-name="Index_20_Link">Design and Implementation of a Feistel-Based Block Cipher with Avalanche Effect Analysis<text:tab/>23</text:a></text:p>
        </text:index-body>
      </text:table-of-content>
      <text:p text:style-name="Standard"/>
      <text:p text:style-name="Standard"/>
      <text:h text:style-name="P11" text:outline-level="1"><text:bookmark-start text:name="__RefHeading___Toc2100_2251553271"/>Week 1: Cryptography Development Environment Setup<text:bookmark-end text:name="__RefHeading___Toc2100_2251553271"/></text:h>
      <text:h text:style-name="P14" text:outline-level="2"><text:bookmark-start text:name="__RefHeading___Toc2102_2251553271"/>Installation and Configuration of the Advanced Cryptography Toolchain<text:bookmark-end text:name="__RefHeading___Toc2102_2251553271"/></text:h>
      <text:p text:style-name="P15">Practical Evidence</text:p>
      <text:p text:style-name="P16"><draw:frame draw:style-name="fr1" draw:name="Image1" text:anchor-type="char" svg:width="6.5in" svg:height="2.5756in" draw:z-index="3"><draw:image xlink:href="Pictures/100000010000028B00000102E125B7F3.png" xlink:type="simple" xlink:show="embed" xlink:actuate="onLoad" draw:mime-type="image/png"/></draw:frame></text:p>
      <text:p text:style-name="P17"><text:span text:style-name="T2">Figure 1: </text:span><text:span text:style-name="T3">Python 3 installation confirmation showing version number and pip availability in the terminal</text:span></text:p>
      <text:p text:style-name="P18"><draw:frame draw:style-name="fr2" draw:name="Image3" text:anchor-type="char" svg:width="6.5in" svg:height="4.6681in" draw:z-index="4"><draw:image xlink:href="Pictures/100000010000028F0000020890919E5E.png" xlink:type="simple" xlink:show="embed" xlink:actuate="onLoad" draw:mime-type="image/png"/></draw:frame>Figure 2: <text:span text:style-name="T4">VS Code environment with the cryptography library successfully installed via pip, confirming zero errors.</text:span></text:p>
      <text:p text:style-name="P19"><draw:frame draw:style-name="fr1" draw:name="Image2" text:anchor-type="char" svg:width="6.5in" svg:height="4.0744in" draw:z-index="5"><draw:image xlink:href="Pictures/10000001000002960000019F593A16EB.png" xlink:type="simple" xlink:show="embed" xlink:actuate="onLoad" draw:mime-type="image/png"/></draw:frame><text:soft-page-break/><text:span text:style-name="T2">Figure 3: </text:span><text:span text:style-name="T3">OpenSSL version command output confirming successful installation and readiness for certificate and key operations.</text:span></text:p>
      <text:p text:style-name="P19"><draw:frame draw:style-name="fr3" draw:name="Image4" text:anchor-type="char" svg:width="6.5in" svg:height="4.028in" draw:z-index="1"><draw:image xlink:href="Pictures/10000001000002C6000001CB14F2EE03.png" xlink:type="simple" xlink:show="embed" xlink:actuate="onLoad" draw:mime-type="image/png"/></draw:frame><text:span text:style-name="T2">Figure 4: </text:span><text:span text:style-name="T3">Execution of a basic Python AES encryption test script demonstrating that the cryptographic library is functional.</text:span></text:p>
      <text:p text:style-name="P19"><draw:frame draw:style-name="fr4" draw:name="Image5" text:anchor-type="char" svg:width="6.5in" svg:height="6.3516in" draw:z-index="2"><draw:image xlink:href="Pictures/10000001000002BE000002AE3D62EC2C.png" xlink:type="simple" xlink:show="embed" xlink:actuate="onLoad" draw:mime-type="image/png"/></draw:frame><text:soft-page-break/><text:span text:style-name="T2">Figure 5: </text:span><text:span text:style-name="T3">GitHub repository initialisation showing the first commit with a README file and project folder structure.</text:span></text:p>
      <text:p text:style-name="P20"/>
      <text:p text:style-name="P21"/>
      <text:p text:style-name="P21"/>
      <text:p text:style-name="P21">Week 1 Reflection</text:p>
      <text:p text:style-name="P22">In week one I successfully configured the development environment. Python 3, VS code, PyCryptodome and OpenSSL installed and verified.</text:p>
      <text:p text:style-name="P22">The AES encryption script confirmed full library functionality and I initialized a github repository with a README and structure thats ready for practical coursework.</text:p>
      <text:p text:style-name="P23"/>
      <text:h text:style-name="P11" text:outline-level="1"><text:bookmark-start text:name="__RefHeading___Toc2104_2251553271"/>Week 2: Classical Cryptography — Cipher Design and Comparison<text:bookmark-end text:name="__RefHeading___Toc2104_2251553271"/></text:h>
      <text:h text:style-name="P14" text:outline-level="2"><text:bookmark-start text:name="__RefHeading___Toc2106_2251553271"/>Implementation of Caesar Cipher and Vigenère Cipher with Comparative Analysis<text:bookmark-end text:name="__RefHeading___Toc2106_2251553271"/></text:h>
      <text:p text:style-name="P24"><text:span text:style-name="T5"/></text:p>
      <text:p text:style-name="P25"/>
      <text:p text:style-name="P15">Practical Evidence</text:p>
      <text:p text:style-name="P16"><draw:frame draw:style-name="fr4" draw:name="Image6" text:anchor-type="char" svg:width="6.5in" svg:height="5.8917in" draw:z-index="6"><draw:image xlink:href="Pictures/10000001000002D7000002934D731273.png" xlink:type="simple" xlink:show="embed" xlink:actuate="onLoad" draw:mime-type="image/png"/></draw:frame></text:p>
      <text:p text:style-name="P19"><text:span text:style-name="T2">Figure 1: </text:span><text:span text:style-name="T3">Caesar Cipher Python implementation showing encryption and decryption of 'SECURITY' with shift value 4.</text:span></text:p>
      <text:p text:style-name="P19"><draw:frame draw:style-name="fr4" draw:name="Image7" text:anchor-type="char" svg:width="6.5in" svg:height="7.4673in" draw:z-index="7"><draw:image xlink:href="Pictures/100000010000033A000003B533038C50.png" xlink:type="simple" xlink:show="embed" xlink:actuate="onLoad" draw:mime-type="image/png"/></draw:frame><text:soft-page-break/><text:span text:style-name="T2">Figure 2: </text:span><text:span text:style-name="T3">Vigenère Cipher Python program encrypting 'NETWORK' using keyword 'KEY', displaying intermediate keystream alignment.</text:span></text:p>
      <text:p text:style-name="P26"/>
      <text:p text:style-name="P26"/>
      <text:p text:style-name="P27"/>
      <text:p text:style-name="P27"/>
      <text:p text:style-name="P19"><draw:frame draw:style-name="fr1" draw:name="Image8" text:anchor-type="char" svg:width="6.5in" svg:height="6.1457in" draw:z-index="8"><draw:image xlink:href="Pictures/100000010000033A0000030D80DB1F89.png" xlink:type="simple" xlink:show="embed" xlink:actuate="onLoad" draw:mime-type="image/png"/></draw:frame><text:soft-page-break/><text:span text:style-name="T2">Figure 3: </text:span><text:span text:style-name="T3">Successful decryption output for both ciphers confirming that the original plaintext is correctly recovered.</text:span></text:p>
      <text:p text:style-name="P27"/>
      <text:p text:style-name="P27"/>
      <text:p text:style-name="P27"/>
      <text:p text:style-name="P19"><draw:frame draw:style-name="fr4" draw:name="Image9" text:anchor-type="char" svg:width="6.5in" svg:height="7.1528in" draw:z-index="9"><draw:image xlink:href="Pictures/100000010000033A0000038D887240B3.png" xlink:type="simple" xlink:show="embed" xlink:actuate="onLoad" draw:mime-type="image/png"/></draw:frame><text:soft-page-break/><text:span text:style-name="T2">Figure 4: </text:span><text:span text:style-name="T3">Frequency analysis output on a sample ciphertext demonstrating the statistical vulnerability of the Caesar Cipher.</text:span></text:p>
      <text:p text:style-name="P26"/>
      <text:p text:style-name="P26"/>
      <text:p text:style-name="P19"><draw:frame draw:style-name="fr4" draw:name="Image10" text:anchor-type="char" svg:width="6.5in" svg:height="6.8701in" draw:z-index="0"><draw:image xlink:href="Pictures/10000001000002E10000030BDB740092.png" xlink:type="simple" xlink:show="embed" xlink:actuate="onLoad" draw:mime-type="image/png"/></draw:frame><text:soft-page-break/><text:span text:style-name="T2">Figure 5: </text:span><text:span text:style-name="T3">Cipher comparison summary table generated by the Python script showing key space size, attack resistance, and security rating.</text:span></text:p>
      <text:p text:style-name="P20"/>
      <text:p text:style-name="P4"/>
      <text:p text:style-name="P28">Week 2 reflection</text:p>
      <text:p text:style-name="P29">Caesar and Vigenère ciphers were implemented and tested in Python. Frequency analysis exposed the Caesar cipher's predictability due to its single shift key space. The Vigenère cipher showed improved resistance through polyalphabetic substitution, though it remains vulnerable when the keyword is short.</text:p>
      <text:p text:style-name="P24"/>
      <text:h text:style-name="P11" text:outline-level="1"><text:bookmark-start text:name="__RefHeading___Toc2108_2251553271"/>Week 3: Stream Ciphers and Pseudorandom Sequence Analysis<text:bookmark-end text:name="__RefHeading___Toc2108_2251553271"/></text:h>
      <text:h text:style-name="P14" text:outline-level="2"><text:bookmark-start text:name="__RefHeading___Toc2110_2251553271"/>Implementation of LFSR, RC4 Simulation, and Statistical Randomness Testing<text:bookmark-end text:name="__RefHeading___Toc2110_2251553271"/></text:h>
      <text:p text:style-name="P15">Practical Evidence</text:p>
      <text:p text:style-name="P19"><draw:frame draw:style-name="fr4" draw:name="Image11" text:anchor-type="char" svg:width="6.5in" svg:height="7.6484in" draw:z-index="10"><draw:image xlink:href="Pictures/10000001000002960000030BB4CFC011.png" xlink:type="simple" xlink:show="embed" xlink:actuate="onLoad" draw:mime-type="image/png"/></draw:frame><text:span text:style-name="T2">Figure 1: </text:span><text:span text:style-name="T3">LFSR generator Python implementation showing register state transitions and the resulting binary output sequence.</text:span></text:p>
      <text:p text:style-name="P19"><draw:frame draw:style-name="fr1" draw:name="Image12" text:anchor-type="char" svg:width="6.5in" svg:height="5.6571in" draw:z-index="11"><draw:image xlink:href="Pictures/100000010000037F0000030B8ED02737.png" xlink:type="simple" xlink:show="embed" xlink:actuate="onLoad" draw:mime-type="image/png"/></draw:frame><text:soft-page-break/><text:span text:style-name="T2">Figure 2: </text:span><text:span text:style-name="T3">Pseudorandom binary sequence of 100+ bits generated by the LFSR, with period detection output displayed in the terminal.</text:span></text:p>
      <text:p text:style-name="P27"/>
      <text:p text:style-name="P27"/>
      <text:p text:style-name="P27"/>
      <text:p text:style-name="P27"/>
      <text:p text:style-name="P27"/>
      <text:p text:style-name="P27"/>
      <text:p text:style-name="P27"/>
      <text:p text:style-name="P27"/>
      <text:p text:style-name="P27"/>
      <text:p text:style-name="P27"/>
      <text:p text:style-name="P19"><draw:frame draw:style-name="fr5" draw:name="Image13" text:anchor-type="char" svg:x="-0.0063in" svg:y="0.0354in" svg:width="5.5209in" svg:height="8.1311in" draw:z-index="12"><draw:image xlink:href="Pictures/1000000100000212000003B550D8CB21.png" xlink:type="simple" xlink:show="embed" xlink:actuate="onLoad" draw:mime-type="image/png"/></draw:frame><text:soft-page-break/><text:span text:style-name="T2">Figure 3: </text:span><text:span text:style-name="T3">Statistical randomness test results showing frequency distribution, runs count, and mean value for the generated sequence.</text:span></text:p>
      <text:p text:style-name="P27"/>
      <text:p text:style-name="P27"/>
      <text:p text:style-name="P19"><draw:frame draw:style-name="fr1" draw:name="Image14" text:anchor-type="char" svg:width="6.5in" svg:height="8.6165in" draw:z-index="13"><draw:image xlink:href="Pictures/1000000100000291000003677B319AA6.png" xlink:type="simple" xlink:show="embed" xlink:actuate="onLoad" draw:mime-type="image/png"/></draw:frame><text:soft-page-break/><text:span text:style-name="T2">Figure 4: </text:span><text:span text:style-name="T3">RC4 stream cipher simulation encrypting a plaintext message and producing XOR-derived ciphertext output.</text:span></text:p>
      <text:p text:style-name="P19"><draw:frame draw:style-name="fr3" draw:name="Image15" text:anchor-type="char" svg:width="6.5in" svg:height="7.8764in" draw:z-index="14"><draw:image xlink:href="Pictures/1000000100000319000003C18765CF4B.png" xlink:type="simple" xlink:show="embed" xlink:actuate="onLoad" draw:mime-type="image/png"/></draw:frame><text:soft-page-break/><text:span text:style-name="T2">Figure 5: </text:span><text:span text:style-name="T3">Weak generator analysis output showing how a short period and predictable repetition compromise stream cipher security.</text:span></text:p>
      <text:p text:style-name="P20"/>
      <text:p text:style-name="P30"/>
      <text:p text:style-name="P30">Week 3 reflection</text:p>
      <text:p text:style-name="P31"><text:soft-page-break/>In week 3 I implemented an LFSR generator and RC4 stream cipher in python. Thetests confirmed acceptable frequency distribution and ran well for a well-configured generator. The weak generators with small registers produced short, repeating periods, showing how poor design makes stream ciphers easy to predict and attack.</text:p>
      <text:p text:style-name="P24"/>
      <text:p text:style-name="P20"/>
      <text:p text:style-name="Standard"/>
      <text:h text:style-name="P11" text:outline-level="1"><text:bookmark-start text:name="__RefHeading___Toc2112_2251553271"/>Week 4: Stream Cipher Cryptanalysis and Berlekamp-Massey Attack<text:bookmark-end text:name="__RefHeading___Toc2112_2251553271"/></text:h>
      <text:h text:style-name="P32" text:outline-level="2"><text:bookmark-start text:name="__RefHeading___Toc2114_2251553271"/><text:span text:style-name="T6">Applying the Berlekamp-Massey Algorithm to Recover LFSR Structure from Output Sequences</text:span><text:bookmark-end text:name="__RefHeading___Toc2114_2251553271"/><text:span text:style-name="T5"/></text:h>
      <text:p text:style-name="P19"><draw:frame draw:style-name="fr4" draw:name="Image16" text:anchor-type="char" svg:width="6.5in" svg:height="7.6091in" draw:z-index="15"><draw:image xlink:href="Pictures/1000000100000319000003D261B7D866.png" xlink:type="simple" xlink:show="embed" xlink:actuate="onLoad" draw:mime-type="image/png"/></draw:frame><text:span text:style-name="T2">Figure 1: </text:span><text:span text:style-name="T3">LFSR sequence generator with configurable tap positions and initial state, displaying step-by-step register transitions.</text:span></text:p>
      <text:p text:style-name="P19"><draw:frame draw:style-name="fr4" draw:name="Image17" text:anchor-type="char" svg:width="6.5in" svg:height="8.0161in" draw:z-index="16"><draw:image xlink:href="Pictures/1000000100000319000003D20D8D4AF8.png" xlink:type="simple" xlink:show="embed" xlink:actuate="onLoad" draw:mime-type="image/png"/></draw:frame><text:soft-page-break/><text:span text:style-name="T2">Figure 2: </text:span><text:span text:style-name="T3">Berlekamp-Massey algorithm output showing the recovered minimal polynomial and linear complexity value for a test sequence.</text:span></text:p>
      <text:p text:style-name="P27"/>
      <text:p text:style-name="P27"/>
      <text:p text:style-name="P19"><draw:frame draw:style-name="fr4" draw:name="Image18" text:anchor-type="char" svg:width="6.5in" svg:height="8.0161in" draw:z-index="17"><draw:image xlink:href="Pictures/1000000100000319000003D24C5CF09E.png" xlink:type="simple" xlink:show="embed" xlink:actuate="onLoad" draw:mime-type="image/png"/></draw:frame><text:soft-page-break/><text:span text:style-name="T2">Figure 3: </text:span><text:span text:style-name="T3">Demonstration of sequence predictability — future bits correctly predicted after applying the recovered recurrence relation.</text:span></text:p>
      <text:p text:style-name="P27"/>
      <text:p text:style-name="P27"/>
      <text:p text:style-name="P19"><draw:frame draw:style-name="fr1" draw:name="Image19" text:anchor-type="char" svg:width="6.5in" svg:height="8.0161in" draw:z-index="18"><draw:image xlink:href="Pictures/1000000100000319000003D2587FCFF5.png" xlink:type="simple" xlink:show="embed" xlink:actuate="onLoad" draw:mime-type="image/png"/></draw:frame><text:soft-page-break/><text:span text:style-name="T2">Figure 4: </text:span><text:span text:style-name="T3">Linear complexity comparison chart for three generator configurations: short, medium, and high complexity sequences.</text:span></text:p>
      <text:p text:style-name="P27"/>
      <text:p text:style-name="P27"/>
      <text:p text:style-name="P19"><draw:frame draw:style-name="fr1" draw:name="Image20" text:anchor-type="char" svg:width="6.5in" svg:height="8.0161in" draw:z-index="19"><draw:image xlink:href="Pictures/1000000100000319000003D23554D9BC.png" xlink:type="simple" xlink:show="embed" xlink:actuate="onLoad" draw:mime-type="image/png"/></draw:frame><text:soft-page-break/><text:span text:style-name="T2">Figure 5: </text:span><text:span text:style-name="T3">Security analysis report output summarising which configurations are cryptographically weak and recommended countermeasures.</text:span></text:p>
      <text:p text:style-name="P20"/>
      <text:p text:style-name="P4"/>
      <text:p text:style-name="P33"><text:soft-page-break/>Week 4 reflection</text:p>
      <text:p text:style-name="P34">In week 4 i implemented the Berlekamp-Massey algorithm and applied it to LFSR output sequences. The algorithm successfully recovered the minimal polynomial from short <text:s/>sequences that were observed, showing how low linear complexity enables full sequence prediction. Strong stream ciphers must incorporate nonlinear components to resist this class of attack.</text:p>
      <text:p text:style-name="P24"/>
      <text:p text:style-name="P20"/>
      <text:p text:style-name="Standard"/>
      <text:h text:style-name="P11" text:outline-level="1"><text:bookmark-start text:name="__RefHeading___Toc2116_2251553271"/>Week 5: Block Ciphers and Feistel Structure Simulation<text:bookmark-end text:name="__RefHeading___Toc2116_2251553271"/></text:h>
      <text:h text:style-name="P14" text:outline-level="2"><text:bookmark-start text:name="__RefHeading___Toc2118_2251553271"/>Design and Implementation of a Feistel-Based Block Cipher with Avalanche Effect Analysis<text:bookmark-end text:name="__RefHeading___Toc2118_2251553271"/></text:h>
      <text:p text:style-name="P16"/>
      <text:p text:style-name="P19"><draw:frame draw:style-name="fr4" draw:name="Image21" text:anchor-type="char" svg:width="6.5in" svg:height="7.4839in" draw:z-index="20"><draw:image xlink:href="Pictures/1000000100000319000003D2D9E6DF40.png" xlink:type="simple" xlink:show="embed" xlink:actuate="onLoad" draw:mime-type="image/png"/></draw:frame><text:span text:style-name="T2">Figure 1: </text:span><text:span text:style-name="T3">Feistel cipher Python implementation showing left/right block splitting, round function application, and final swap logic.</text:span></text:p>
      <text:p text:style-name="P27"/>
      <text:p text:style-name="P19"><draw:frame draw:style-name="fr4" draw:name="Image22" text:anchor-type="char" svg:width="6.5in" svg:height="8.0161in" draw:z-index="21"><draw:image xlink:href="Pictures/1000000100000319000003D21DC24A58.png" xlink:type="simple" xlink:show="embed" xlink:actuate="onLoad" draw:mime-type="image/png"/></draw:frame><text:soft-page-break/><text:span text:style-name="T2">Figure 2: </text:span><text:span text:style-name="T3">Step-by-step round output table displaying left and right halves at each of the four encryption rounds.</text:span></text:p>
      <text:p text:style-name="P27"/>
      <text:p text:style-name="P27"/>
      <text:p text:style-name="P19"><draw:frame draw:style-name="fr4" draw:name="Image23" text:anchor-type="char" svg:width="6.5in" svg:height="8.0161in" draw:z-index="22"><draw:image xlink:href="Pictures/1000000100000319000003D2BA765B82.png" xlink:type="simple" xlink:show="embed" xlink:actuate="onLoad" draw:mime-type="image/png"/></draw:frame><text:soft-page-break/><text:span text:style-name="T2">Figure 3: </text:span><text:span text:style-name="T3">Successful decryption output confirming that the Feistel structure correctly recovers the original plaintext from ciphertext.</text:span></text:p>
      <text:p text:style-name="P27"/>
      <text:p text:style-name="P19"><draw:frame draw:style-name="fr4" draw:name="Image24" text:anchor-type="char" svg:width="6.5in" svg:height="8.0161in" draw:z-index="23"><draw:image xlink:href="Pictures/1000000100000319000003D2E736C683.png" xlink:type="simple" xlink:show="embed" xlink:actuate="onLoad" draw:mime-type="image/png"/></draw:frame><text:soft-page-break/><text:span text:style-name="T2">Figure 4: </text:span><text:span text:style-name="T3">Avalanche effect experiment results — bit-difference count between two ciphertext outputs when one plaintext bit is flipped.</text:span></text:p>
      <text:p text:style-name="P27"/>
      <text:p text:style-name="P27"/>
      <text:p text:style-name="P19"><draw:frame draw:style-name="fr4" draw:name="Image25" text:anchor-type="char" svg:width="6.5in" svg:height="8.0161in" draw:z-index="24"><draw:image xlink:href="Pictures/1000000100000319000003D273A72E46.png" xlink:type="simple" xlink:show="embed" xlink:actuate="onLoad" draw:mime-type="image/png"/></draw:frame><text:soft-page-break/><text:span text:style-name="T2">Figure 5: </text:span><text:span text:style-name="T3">Graphical console output showing how bit differences accumulate across rounds, illustrating diffusion behaviour.</text:span></text:p>
      <text:p text:style-name="P20"/>
      <text:p text:style-name="P4"/>
      <text:p text:style-name="P35"><text:soft-page-break/>Week 5 reflection<text:line-break/><text:span text:style-name="T7">In week 5</text:span> <text:span text:style-name="T7">I implemented a four-round Feistel cipher and verified that encryption and decryption work as inverse operations using reversed round keys. I then tested the avalanche effect by flipping a single plaintext bit and observed the difference across rounds and this confirmed the Feistel structure provides meaningful diffusion across the block.</text:span></text:p>
      <text:p text:style-name="P24"/>
      <text:p text:style-name="P20"/>
      <text:p text:style-name="Standard"/>
      <text:h text:style-name="P36"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1665in" fo:margin-bottom="0.0835in" style:contextual-spacing="false"/>
      <style:text-properties fo:color="#000000"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default-outline-level="2" style:list-style-name="" style:class="chapter">
      <style:paragraph-properties fo:margin-top="0.139in" fo:margin-bottom="0.0693in" style:contextual-spacing="false"/>
      <style:text-properties fo:color="#000000"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in" fo:padding-right="0in" fo:padding-top="0in" fo:padding-bottom="0.0138in" fo:border-left="none" fo:border-right="none" fo:border-top="none" fo:border-bottom="0.51pt solid #aaaaaa">
        <style:tab-stops>
          <style:tab-stop style:position="6.2681in" style:type="right"/>
        </style:tab-stops>
      </style:paragraph-properties>
    </style:style>
    <style:style style:name="MP2" style:family="paragraph" style:parent-style-name="Standard">
      <style:paragraph-properties fo:padding-left="0in" fo:padding-right="0in" fo:padding-top="0.0138in" fo:padding-bottom="0in" fo:border-left="none" fo:border-right="none" fo:border-top="0.51pt solid #aaaaaa" fo:border-bottom="none">
        <style:tab-stops>
          <style:tab-stop style:position="6.2681in" style:type="right"/>
        </style:tab-stops>
      </style:paragraph-properties>
    </style:style>
    <style:style style:name="MT1" style:family="text">
      <style:text-properties fo:color="#555555" loext:opacity="100%" style:font-name="Arial" fo:font-size="9pt" style:font-name-asian="Arial2" style:font-size-asian="9pt" style:font-name-complex="Arial2" style:font-size-complex="9pt"/>
    </style:style>
    <style:style style:name="MT2" style:family="text">
      <style:text-properties style:font-name="Arial" fo:font-size="9pt" style:font-name-asian="Arial2" style:font-size-asian="9pt" style:font-name-complex="Arial2" style:font-size-complex="9pt"/>
    </style:style>
    <style:page-layout style:name="Mpm1">
      <style:page-layout-properties fo:page-width="8.5in" fo:page-height="11in" style:num-format="1" style:print-orientation="portrait" fo:margin-top="0.4917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IT4138: Advanced Cryptography <text:s/>| <text:s/>Practical Logbook</text:span><text:span text:style-name="MT2"><text:tab/></text:span><text:span text:style-name="MT1">Mount Kenya University</text:span></text:p>
      </style:header>
      <style:footer>
        <text:p text:style-name="MP2"><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7</meta:editing-cycles>
    <meta:creation-date>2026-06-07T20:43:56.544000000</meta:creation-date>
    <dc:date>2026-06-08T10:08:57.428731809</dc:date>
    <meta:editing-duration>PT59M35S</meta:editing-duration>
    <meta:generator>LibreOffice/26.2.3.2$Linux_X86_64 LibreOffice_project/620$Build-2</meta:generator>
    <meta:document-statistic meta:table-count="0" meta:image-count="25" meta:object-count="0" meta:page-count="29" meta:paragraph-count="72" meta:word-count="904" meta:character-count="6682" meta:non-whitespace-character-count="5748"/>
  </office:meta>
</office:document-meta>
</file>